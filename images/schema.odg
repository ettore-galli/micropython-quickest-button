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AA000003844C2F80D832F6858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.721cm)" draw:image-opacity="100%" style:mirror="none"/>
    </style:style>
    <style:style style:name="gr2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1cm" fo:min-width="4.51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1cm" fo:min-width="4.479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1cm" fo:min-width="4.508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loext:fill-use-slide-background="false" draw:opacity="100%" draw:opacity-name="Transparency_20_6" draw:textarea-horizontal-align="justify" draw:textarea-vertical-align="middle" draw:auto-grow-height="false" fo:min-height="0.1cm" fo:min-width="4.508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1cm" fo:min-width="3.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3pt" style:font-size-asian="14pt" style:font-size-complex="14pt"/>
    </style:style>
    <style:style style:name="P3" style:family="paragraph">
      <loext:graphic-properties draw:fill="solid" draw:fill-color="#ffffff"/>
      <style:paragraph-properties fo:text-align="start"/>
      <style:text-properties fo:font-size="13pt" style:font-size-asian="14pt" style:font-size-complex="14pt"/>
    </style:style>
    <style:style style:name="P4" style:family="paragraph">
      <loext:graphic-properties draw:fill="solid" draw:fill-color="#ffffff" draw:opacity="100%" draw:opacity-name="Transparency_20_6"/>
      <style:paragraph-properties fo:text-align="start"/>
      <style:text-properties fo:font-size="13pt" style:font-size-asian="14pt" style:font-size-complex="14pt"/>
    </style:style>
    <style:style style:name="P5" style:family="paragraph">
      <style:paragraph-properties fo:text-align="end"/>
      <style:text-properties fo:font-size="13pt" style:font-size-asian="14pt" style:font-size-complex="14pt"/>
    </style:style>
    <style:style style:name="P6" style:family="paragraph">
      <loext:graphic-properties draw:fill="solid" draw:fill-color="#ffffff"/>
      <style:paragraph-properties fo:text-align="end"/>
      <style:text-properties fo:font-size="13pt" style:font-size-asian="14pt" style:font-size-complex="14pt"/>
    </style:style>
    <style:style style:name="T1" style:family="text">
      <style:text-properties fo:font-weight="bold" style:font-size-asian="14pt" style:font-weight-asian="bold" style:font-size-complex="14pt" style:font-weight-complex="bold"/>
    </style:style>
    <style:style style:name="T2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3cm" svg:height="13cm" svg:x="6cm" svg:y="4.1cm">
          <draw:image xlink:href="Pictures/10000001000005AA000003844C2F80D832F68582.png" xlink:type="simple" xlink:show="embed" xlink:actuate="onLoad" draw:mime-type="image/png">
            <text:p/>
          </draw:image>
        </draw:frame>
        <draw:custom-shape draw:style-name="gr2" draw:text-style-name="P3" draw:layer="layout" svg:width="5.01cm" svg:height="0.35cm" svg:x="17.971cm" svg:y="14.7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79cm" svg:height="0.35cm" svg:x="17.992cm" svg:y="13.8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1cm" svg:height="0.35cm" svg:x="17.992cm" svg:y="13.35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1cm" svg:height="0.35cm" svg:x="17.992cm" svg:y="12.9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79cm" svg:height="0.35cm" svg:x="17.992cm" svg:y="12.4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08cm" svg:height="0.35cm" svg:x="17.992cm" svg:y="12.05cm">
          <text:p text:style-name="P2"><text:span text:style-name="T2">MASSA PULSANT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08cm" svg:height="0.35cm" svg:x="17.992cm" svg:y="11.6cm">
          <text:p text:style-name="P2"><text:span text:style-name="T1">RESE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1cm" svg:height="0.35cm" svg:x="6.4cm" svg:y="14.7cm">
          <text:p text:style-name="P5"><text:span text:style-name="T2">LED 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1cm" svg:height="0.35cm" svg:x="6.4cm" svg:y="13.8cm">
          <text:p text:style-name="P5"><text:span text:style-name="T2">LED </text:span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1cm" svg:height="0.35cm" svg:x="6.4cm" svg:y="13.35cm">
          <text:p text:style-name="P5"><text:span text:style-name="T2">LED 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1cm" svg:height="0.35cm" svg:x="6.4cm" svg:y="12.9cm">
          <text:p text:style-name="P5"><text:span text:style-name="T2">LED 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1cm" svg:height="0.35cm" svg:x="6.4cm" svg:y="12.5cm">
          <text:p text:style-name="P5"><text:span text:style-name="T2">LED 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1cm" svg:height="0.35cm" svg:x="6.4cm" svg:y="14.25cm">
          <text:p text:style-name="P5"><text:span text:style-name="T2">M</text:span><text:span text:style-name="T2">A</text:span><text:span text:style-name="T2">S</text:span><text:span text:style-name="T2">S</text:span><text:span text:style-name="T2">A</text:span><text:span text:style-name="T2"> </text:span><text:span text:style-name="T2">L</text:span><text:span text:style-name="T2">E</text:span><text:span text:style-name="T2">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5" draw:display-name="Transparency 5" draw:style="square" draw:cx="50%" draw:cy="50%" draw:start="100%" draw:end="0%" draw:angle="0deg" draw:border="0%"/>
    <draw:opacity draw:name="Transparency_20_6" draw:display-name="Transparency 6" draw:style="rectangular" draw:cx="50%" draw:cy="50%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11:18:51.157374409</meta:creation-date>
    <meta:generator>LibreOffice/7.4.5.1$MacOSX_AARCH64 LibreOffice_project/9c0871452b3918c1019dde9bfac75448afc4b57f</meta:generator>
    <dc:date>2026-06-01T12:05:26.706083037</dc:date>
    <meta:editing-duration>PT46M29S</meta:editing-duration>
    <meta:editing-cycles>14</meta:editing-cycles>
    <meta:document-statistic meta:object-count="14"/>
  </office:meta>
</office:document-meta>
</file>